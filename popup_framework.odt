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officeooo:rsid="0005f4f8" officeooo:paragraph-rsid="0005f4f8"/>
    </style:style>
    <style:style style:name="P2" style:family="paragraph" style:parent-style-name="Standard">
      <style:text-properties style:font-name="Courier New" fo:font-weight="bold" officeooo:rsid="0005f4f8" officeooo:paragraph-rsid="0005f4f8" style:font-weight-asian="bold" style:font-weight-complex="bold"/>
    </style:style>
    <style:style style:name="P3" style:family="paragraph" style:parent-style-name="Standard">
      <style:text-properties style:font-name="Courier New" fo:font-size="10pt" officeooo:rsid="0008275e" officeooo:paragraph-rsid="0008275e" style:font-size-asian="10pt" style:font-size-complex="10pt"/>
    </style:style>
    <style:style style:name="P4" style:family="paragraph" style:parent-style-name="Standard">
      <style:text-properties style:font-name="Courier New" fo:font-size="10pt" officeooo:rsid="0008275e" officeooo:paragraph-rsid="0027a892" style:font-size-asian="10pt" style:font-size-complex="10pt"/>
    </style:style>
    <style:style style:name="P5" style:family="paragraph" style:parent-style-name="Standard">
      <style:text-properties style:font-name="Courier New" fo:font-style="normal" fo:font-weight="normal" officeooo:rsid="0008275e" officeooo:paragraph-rsid="0008275e" style:font-style-asian="normal" style:font-weight-asian="normal" style:font-style-complex="normal" style:font-weight-complex="normal"/>
    </style:style>
    <style:style style:name="P6" style:family="paragraph" style:parent-style-name="Standard">
      <style:text-properties style:font-name="Times New Roman" officeooo:rsid="0001e905" officeooo:paragraph-rsid="0001e905"/>
    </style:style>
    <style:style style:name="P7" style:family="paragraph" style:parent-style-name="Standard">
      <style:text-properties style:font-name="Times New Roman" officeooo:rsid="0001eb8d" officeooo:paragraph-rsid="0001eb8d"/>
    </style:style>
    <style:style style:name="P8" style:family="paragraph" style:parent-style-name="Standard">
      <style:text-properties style:font-name="Times New Roman" officeooo:rsid="00045838" officeooo:paragraph-rsid="00045838"/>
    </style:style>
    <style:style style:name="P9" style:family="paragraph" style:parent-style-name="Standard">
      <style:text-properties style:font-name="Times New Roman" officeooo:rsid="0005f4f8" officeooo:paragraph-rsid="0005f4f8"/>
    </style:style>
    <style:style style:name="P10" style:family="paragraph" style:parent-style-name="Standard">
      <style:text-properties style:font-name="Times New Roman" officeooo:rsid="0009b23a" officeooo:paragraph-rsid="000cc963"/>
    </style:style>
    <style:style style:name="P11" style:family="paragraph" style:parent-style-name="Standard">
      <style:text-properties style:font-name="Times New Roman" fo:font-style="normal" fo:font-weight="normal" officeooo:rsid="0008275e" officeooo:paragraph-rsid="0008275e" style:font-style-asian="normal" style:font-weight-asian="normal" style:font-style-complex="normal" style:font-weight-complex="normal"/>
    </style:style>
    <style:style style:name="P12" style:family="paragraph" style:parent-style-name="Standard">
      <style:text-properties style:font-name="Times New Roman" fo:font-style="normal" fo:font-weight="normal" officeooo:rsid="000b38d5" officeooo:paragraph-rsid="000b38d5" style:font-style-asian="normal" style:font-weight-asian="normal" style:font-style-complex="normal" style:font-weight-complex="normal"/>
    </style:style>
    <style:style style:name="P13" style:family="paragraph" style:parent-style-name="Standard">
      <style:text-properties style:font-name="Times New Roman" fo:font-style="normal" fo:font-weight="normal" officeooo:rsid="0009b23a" officeooo:paragraph-rsid="0008275e" style:font-style-asian="normal" style:font-weight-asian="normal" style:font-style-complex="normal" style:font-weight-complex="normal"/>
    </style:style>
    <style:style style:name="P14" style:family="paragraph" style:parent-style-name="Standard">
      <style:text-properties style:font-name="Times New Roman" fo:font-style="normal" fo:font-weight="normal" officeooo:rsid="0016a992" officeooo:paragraph-rsid="0016a992" style:font-style-asian="normal" style:font-weight-asian="normal" style:font-style-complex="normal" style:font-weight-complex="normal"/>
    </style:style>
    <style:style style:name="P15" style:family="paragraph" style:parent-style-name="Standard">
      <style:text-properties style:font-name="Times New Roman" fo:font-style="normal" fo:font-weight="normal" officeooo:rsid="00074b6e" officeooo:paragraph-rsid="0006807b" style:font-style-asian="normal" style:font-weight-asian="normal" style:font-style-complex="normal" style:font-weight-complex="normal"/>
    </style:style>
    <style:style style:name="P16" style:family="paragraph" style:parent-style-name="Standard">
      <style:text-properties style:font-name="Times New Roman" officeooo:rsid="0006807b" officeooo:paragraph-rsid="0006807b"/>
    </style:style>
    <style:style style:name="P17" style:family="paragraph" style:parent-style-name="Standard">
      <style:text-properties style:font-name="Times New Roman" officeooo:rsid="002edc12" officeooo:paragraph-rsid="002edc12"/>
    </style:style>
    <style:style style:name="P18" style:family="paragraph" style:parent-style-name="Standard">
      <style:paragraph-properties fo:margin-left="1.251cm" fo:margin-right="0cm" fo:text-indent="-1.3cm" style:auto-text-indent="false">
        <style:tab-stops/>
      </style:paragraph-properties>
      <style:text-properties style:font-name="Times New Roman" officeooo:rsid="0009b23a" officeooo:paragraph-rsid="0009b23a"/>
    </style:style>
    <style:style style:name="P19" style:family="paragraph" style:parent-style-name="Standard">
      <style:paragraph-properties fo:margin-left="1.251cm" fo:margin-right="0cm" fo:text-indent="-1.3cm" style:auto-text-indent="false">
        <style:tab-stops/>
      </style:paragraph-properties>
      <style:text-properties style:font-name="Times New Roman" officeooo:rsid="0009b23a" officeooo:paragraph-rsid="0028ab93"/>
    </style:style>
    <style:style style:name="P20" style:family="paragraph" style:parent-style-name="Standard">
      <style:paragraph-properties fo:margin-left="1.251cm" fo:margin-right="0cm" fo:text-indent="-1.3cm" style:auto-text-indent="false">
        <style:tab-stops/>
      </style:paragraph-properties>
      <style:text-properties style:font-name="Times New Roman" officeooo:rsid="000da208" officeooo:paragraph-rsid="000da208"/>
    </style:style>
    <style:style style:name="P21" style:family="paragraph" style:parent-style-name="Standard">
      <style:paragraph-properties fo:margin-left="1.251cm" fo:margin-right="0cm" fo:text-indent="-1.3cm" style:auto-text-indent="false">
        <style:tab-stops/>
      </style:paragraph-properties>
      <style:text-properties style:font-name="Times New Roman" officeooo:rsid="000da208" officeooo:paragraph-rsid="0028ab93"/>
    </style:style>
    <style:style style:name="P22" style:family="paragraph" style:parent-style-name="Standard">
      <style:paragraph-properties fo:margin-left="1.251cm" fo:margin-right="0cm" fo:text-indent="-1.3cm" style:auto-text-indent="false">
        <style:tab-stops/>
      </style:paragraph-properties>
      <style:text-properties style:font-name="Times New Roman" officeooo:rsid="0010d1ef" officeooo:paragraph-rsid="0010d1ef"/>
    </style:style>
    <style:style style:name="P23" style:family="paragraph" style:parent-style-name="Standard">
      <style:paragraph-properties fo:margin-left="1.251cm" fo:margin-right="0cm" fo:text-indent="-1.3cm" style:auto-text-indent="false">
        <style:tab-stops/>
      </style:paragraph-properties>
      <style:text-properties style:font-name="Times New Roman" officeooo:rsid="0010d1ef" officeooo:paragraph-rsid="00157efe"/>
    </style:style>
    <style:style style:name="P24" style:family="paragraph" style:parent-style-name="Standard">
      <style:paragraph-properties fo:margin-left="1.251cm" fo:margin-right="0cm" fo:text-indent="-1.3cm" style:auto-text-indent="false">
        <style:tab-stops/>
      </style:paragraph-properties>
      <style:text-properties style:font-name="Times New Roman" officeooo:rsid="0010d1ef" officeooo:paragraph-rsid="001c4fd0"/>
    </style:style>
    <style:style style:name="P25" style:family="paragraph" style:parent-style-name="Standard">
      <style:paragraph-properties fo:margin-left="1.251cm" fo:margin-right="0cm" fo:text-indent="-1.3cm" style:auto-text-indent="false">
        <style:tab-stops/>
      </style:paragraph-properties>
      <style:text-properties style:font-name="Times New Roman" officeooo:rsid="001282dd" officeooo:paragraph-rsid="001282dd"/>
    </style:style>
    <style:style style:name="P26" style:family="paragraph" style:parent-style-name="Standard">
      <style:paragraph-properties fo:margin-left="1.251cm" fo:margin-right="0cm" fo:text-indent="-1.3cm" style:auto-text-indent="false">
        <style:tab-stops/>
      </style:paragraph-properties>
      <style:text-properties style:font-name="Times New Roman" officeooo:rsid="001282dd" officeooo:paragraph-rsid="0013b3bc"/>
    </style:style>
    <style:style style:name="P27" style:family="paragraph" style:parent-style-name="Standard">
      <style:paragraph-properties fo:margin-left="1.251cm" fo:margin-right="0cm" fo:text-indent="-1.3cm" style:auto-text-indent="false">
        <style:tab-stops/>
      </style:paragraph-properties>
      <style:text-properties style:font-name="Times New Roman" officeooo:rsid="001282dd" officeooo:paragraph-rsid="0016a992"/>
    </style:style>
    <style:style style:name="P28" style:family="paragraph" style:parent-style-name="Standard">
      <style:paragraph-properties fo:margin-left="1.251cm" fo:margin-right="0cm" fo:text-indent="-1.3cm" style:auto-text-indent="false">
        <style:tab-stops/>
      </style:paragraph-properties>
      <style:text-properties style:font-name="Times New Roman" officeooo:rsid="001282dd" officeooo:paragraph-rsid="0018b253"/>
    </style:style>
    <style:style style:name="P29" style:family="paragraph" style:parent-style-name="Standard">
      <style:paragraph-properties fo:margin-left="1.251cm" fo:margin-right="0cm" fo:text-indent="-1.3cm" style:auto-text-indent="false">
        <style:tab-stops/>
      </style:paragraph-properties>
      <style:text-properties style:font-name="Times New Roman" officeooo:rsid="001282dd" officeooo:paragraph-rsid="001c4fd0"/>
    </style:style>
    <style:style style:name="P30" style:family="paragraph" style:parent-style-name="Standard">
      <style:paragraph-properties fo:margin-left="1.251cm" fo:margin-right="0cm" fo:text-indent="-1.3cm" style:auto-text-indent="false">
        <style:tab-stops/>
      </style:paragraph-properties>
      <style:text-properties style:font-name="Times New Roman" fo:font-style="normal" fo:font-weight="normal" officeooo:rsid="000f3a83" officeooo:paragraph-rsid="000da208" style:font-style-asian="normal" style:font-weight-asian="normal" style:font-style-complex="normal" style:font-weight-complex="normal"/>
    </style:style>
    <style:style style:name="P31" style:family="paragraph" style:parent-style-name="Standard">
      <style:paragraph-properties fo:margin-left="1.251cm" fo:margin-right="0cm" fo:text-indent="-1.3cm" style:auto-text-indent="false">
        <style:tab-stops/>
      </style:paragraph-properties>
      <style:text-properties style:font-name="Times New Roman" fo:font-style="normal" fo:font-weight="normal" officeooo:rsid="001282dd" officeooo:paragraph-rsid="0013b3bc" style:font-style-asian="normal" style:font-weight-asian="normal" style:font-style-complex="normal" style:font-weight-complex="normal"/>
    </style:style>
    <style:style style:name="P32" style:family="paragraph" style:parent-style-name="Standard">
      <style:paragraph-properties fo:margin-left="1.251cm" fo:margin-right="0cm" fo:text-indent="-1.3cm" style:auto-text-indent="false">
        <style:tab-stops/>
      </style:paragraph-properties>
      <style:text-properties style:font-name="Times New Roman" fo:font-style="normal" fo:font-weight="normal" officeooo:rsid="001d60f0" officeooo:paragraph-rsid="001e28e9" style:font-style-asian="normal" style:font-weight-asian="normal" style:font-style-complex="normal" style:font-weight-complex="normal"/>
    </style:style>
    <style:style style:name="P33" style:family="paragraph" style:parent-style-name="Standard">
      <style:paragraph-properties fo:margin-left="1.251cm" fo:margin-right="0cm" fo:text-indent="-1.3cm" style:auto-text-indent="false">
        <style:tab-stops/>
      </style:paragraph-properties>
      <style:text-properties style:font-name="Times New Roman" fo:font-style="normal" fo:font-weight="normal" officeooo:rsid="001d60f0" officeooo:paragraph-rsid="00230afb" style:font-style-asian="normal" style:font-weight-asian="normal" style:font-style-complex="normal" style:font-weight-complex="normal"/>
    </style:style>
    <style:style style:name="P34" style:family="paragraph" style:parent-style-name="Standard">
      <style:paragraph-properties fo:margin-left="1.251cm" fo:margin-right="0cm" fo:text-indent="-1.3cm" style:auto-text-indent="false">
        <style:tab-stops/>
      </style:paragraph-properties>
      <style:text-properties style:font-name="Times New Roman" fo:font-style="normal" fo:font-weight="normal" officeooo:rsid="000da208" officeooo:paragraph-rsid="0029965d" style:font-style-asian="normal" style:font-weight-asian="normal" style:font-style-complex="normal" style:font-weight-complex="normal"/>
    </style:style>
    <style:style style:name="P35" style:family="paragraph" style:parent-style-name="Standard">
      <style:paragraph-properties fo:margin-left="1.251cm" fo:margin-right="0cm" fo:text-indent="-1.3cm" style:auto-text-indent="false">
        <style:tab-stops/>
      </style:paragraph-properties>
      <style:text-properties style:font-name="Times New Roman" fo:font-style="normal" fo:font-weight="normal" officeooo:rsid="0029965d" officeooo:paragraph-rsid="0029965d" style:font-style-asian="normal" style:font-weight-asian="normal" style:font-style-complex="normal" style:font-weight-complex="normal"/>
    </style:style>
    <style:style style:name="P36" style:family="paragraph" style:parent-style-name="Standard">
      <style:paragraph-properties fo:margin-left="1.251cm" fo:margin-right="0cm" fo:text-indent="-1.3cm" style:auto-text-indent="false">
        <style:tab-stops/>
      </style:paragraph-properties>
      <style:text-properties style:font-name="Times New Roman" officeooo:rsid="001d60f0" officeooo:paragraph-rsid="001d60f0"/>
    </style:style>
    <style:style style:name="P37" style:family="paragraph" style:parent-style-name="Standard">
      <style:paragraph-properties fo:margin-left="1.251cm" fo:margin-right="0cm" fo:text-indent="-1.3cm" style:auto-text-indent="false">
        <style:tab-stops/>
      </style:paragraph-properties>
      <style:text-properties style:font-name="Times New Roman" officeooo:rsid="001d60f0" officeooo:paragraph-rsid="001e28e9"/>
    </style:style>
    <style:style style:name="P38" style:family="paragraph" style:parent-style-name="Standard">
      <style:paragraph-properties fo:margin-left="1.251cm" fo:margin-right="0cm" fo:text-indent="-1.3cm" style:auto-text-indent="false">
        <style:tab-stops/>
      </style:paragraph-properties>
      <style:text-properties style:font-name="Times New Roman" officeooo:rsid="001d60f0" officeooo:paragraph-rsid="00230afb"/>
    </style:style>
    <style:style style:name="P39" style:family="paragraph" style:parent-style-name="Standard">
      <style:paragraph-properties fo:margin-left="1.251cm" fo:margin-right="0cm" fo:text-indent="-1.3cm" style:auto-text-indent="false">
        <style:tab-stops/>
      </style:paragraph-properties>
      <style:text-properties style:font-name="Times New Roman" officeooo:rsid="001ddeb4" officeooo:paragraph-rsid="001ddeb4"/>
    </style:style>
    <style:style style:name="P40" style:family="paragraph" style:parent-style-name="Standard">
      <style:paragraph-properties fo:margin-left="0cm" fo:margin-right="0cm" fo:text-indent="0cm" style:auto-text-indent="false">
        <style:tab-stops/>
      </style:paragraph-properties>
      <style:text-properties style:font-name="Times New Roman" officeooo:rsid="001282dd" officeooo:paragraph-rsid="0016a992"/>
    </style:style>
    <style:style style:name="P41"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13b3bc" officeooo:paragraph-rsid="0013b3bc" style:font-style-asian="normal" style:font-weight-asian="normal" style:font-style-complex="normal" style:font-weight-complex="normal"/>
    </style:style>
    <style:style style:name="P42"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183e55" officeooo:paragraph-rsid="00183e55" style:font-style-asian="normal" style:font-weight-asian="normal" style:font-style-complex="normal" style:font-weight-complex="normal"/>
    </style:style>
    <style:style style:name="P43"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18b253" officeooo:paragraph-rsid="0018b253" style:font-style-asian="normal" style:font-weight-asian="normal" style:font-style-complex="normal" style:font-weight-complex="normal"/>
    </style:style>
    <style:style style:name="P44"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1af3ec" officeooo:paragraph-rsid="0018b253" style:font-style-asian="normal" style:font-weight-asian="normal" style:font-style-complex="normal" style:font-weight-complex="normal"/>
    </style:style>
    <style:style style:name="P45"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1af3ec" officeooo:paragraph-rsid="00230afb" style:font-style-asian="normal" style:font-weight-asian="normal" style:font-style-complex="normal" style:font-weight-complex="normal"/>
    </style:style>
    <style:style style:name="P46"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1e28e9" officeooo:paragraph-rsid="001e28e9" style:font-style-asian="normal" style:font-weight-asian="normal" style:font-style-complex="normal" style:font-weight-complex="normal"/>
    </style:style>
    <style:style style:name="P47"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2929f2" officeooo:paragraph-rsid="002929f2" style:font-style-asian="normal" style:font-weight-asian="normal" style:font-style-complex="normal" style:font-weight-complex="normal"/>
    </style:style>
    <style:style style:name="P48"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2b01f4" officeooo:paragraph-rsid="002b01f4" style:font-style-asian="normal" style:font-weight-asian="normal" style:font-style-complex="normal" style:font-weight-complex="normal"/>
    </style:style>
    <style:style style:name="P49" style:family="paragraph" style:parent-style-name="Standard">
      <style:paragraph-properties fo:margin-left="0cm" fo:margin-right="0cm" fo:text-indent="0cm" style:auto-text-indent="false">
        <style:tab-stops/>
      </style:paragraph-properties>
      <style:text-properties style:font-name="Times New Roman" officeooo:rsid="001af3ec" officeooo:paragraph-rsid="001af3ec"/>
    </style:style>
    <style:style style:name="P50" style:family="paragraph" style:parent-style-name="Standard">
      <style:paragraph-properties fo:margin-left="0cm" fo:margin-right="0cm" fo:text-indent="0cm" style:auto-text-indent="false">
        <style:tab-stops/>
      </style:paragraph-properties>
      <style:text-properties style:font-name="Courier New" officeooo:rsid="0013b3bc" officeooo:paragraph-rsid="0016a992"/>
    </style:style>
    <style:style style:name="P51" style:family="paragraph" style:parent-style-name="Standard">
      <style:paragraph-properties fo:margin-left="0cm" fo:margin-right="0cm" fo:text-indent="0cm" style:auto-text-indent="false">
        <style:tab-stops/>
      </style:paragraph-properties>
      <style:text-properties style:font-name="Courier New" officeooo:rsid="00183e55" officeooo:paragraph-rsid="00183e55"/>
    </style:style>
    <style:style style:name="P52" style:family="paragraph" style:parent-style-name="Standard">
      <style:paragraph-properties fo:margin-left="0cm" fo:margin-right="0cm" fo:text-indent="0cm" style:auto-text-indent="false">
        <style:tab-stops/>
      </style:paragraph-properties>
      <style:text-properties style:font-name="Courier New" officeooo:rsid="0018b253" officeooo:paragraph-rsid="0018b253"/>
    </style:style>
    <style:style style:name="P53" style:family="paragraph" style:parent-style-name="Standard">
      <style:paragraph-properties fo:margin-left="0cm" fo:margin-right="0cm" fo:text-indent="0cm" style:auto-text-indent="false">
        <style:tab-stops/>
      </style:paragraph-properties>
      <style:text-properties style:font-name="Courier New" fo:font-style="normal" fo:font-weight="normal" officeooo:rsid="002929f2" officeooo:paragraph-rsid="002929f2" style:font-style-asian="normal" style:font-weight-asian="normal" style:font-style-complex="normal" style:font-weight-complex="normal"/>
    </style:style>
    <style:style style:name="P54" style:family="paragraph" style:parent-style-name="Title">
      <style:text-properties style:font-name="Times New Roman"/>
    </style:style>
    <style:style style:name="P55" style:family="paragraph" style:parent-style-name="Text_20_body">
      <style:text-properties style:font-name="Times New Roman" officeooo:rsid="0026f11e" officeooo:paragraph-rsid="0026f11e"/>
    </style:style>
    <style:style style:name="P56" style:family="paragraph" style:parent-style-name="Text_20_body">
      <style:text-properties style:font-name="Times New Roman" officeooo:rsid="0027a892" officeooo:paragraph-rsid="0027a892"/>
    </style:style>
    <style:style style:name="P57" style:family="paragraph" style:parent-style-name="Text_20_body">
      <style:text-properties officeooo:rsid="002b01f4" officeooo:paragraph-rsid="002b01f4"/>
    </style:style>
    <style:style style:name="P58" style:family="paragraph" style:parent-style-name="Text_20_body">
      <style:text-properties officeooo:rsid="002b01f4" officeooo:paragraph-rsid="002c41b2"/>
    </style:style>
    <style:style style:name="P59" style:family="paragraph" style:parent-style-name="Heading_20_2">
      <style:text-properties officeooo:paragraph-rsid="002c41b2"/>
    </style:style>
    <style:style style:name="P60" style:family="paragraph" style:parent-style-name="Heading_20_2">
      <style:text-properties style:font-name="Times New Roman"/>
    </style:style>
    <style:style style:name="P61" style:family="paragraph" style:parent-style-name="Heading_20_2">
      <style:text-properties style:font-name="Times New Roman" officeooo:rsid="003146de" officeooo:paragraph-rsid="003146de"/>
    </style:style>
    <style:style style:name="P62" style:family="paragraph" style:parent-style-name="Heading_20_1">
      <style:text-properties style:font-name="Times New Roman"/>
    </style:style>
    <style:style style:name="P63" style:family="paragraph" style:parent-style-name="Heading_20_1">
      <style:text-properties style:font-name="Times New Roman" fo:font-weight="bold" style:font-weight-asian="bold" style:font-weight-complex="bold"/>
    </style:style>
    <style:style style:name="P64" style:family="paragraph" style:parent-style-name="Heading_20_1">
      <style:text-properties officeooo:rsid="0026f11e" officeooo:paragraph-rsid="0026f11e"/>
    </style:style>
    <style:style style:name="P65" style:family="paragraph" style:parent-style-name="Heading_20_1">
      <style:text-properties style:font-name="Times New Roman" officeooo:rsid="002edc12" officeooo:paragraph-rsid="002edc12"/>
    </style:style>
    <style:style style:name="P66" style:family="paragraph" style:parent-style-name="Standard" style:list-style-name="L1">
      <style:text-properties style:font-name="Times New Roman" officeooo:rsid="0001e905" officeooo:paragraph-rsid="0001e905"/>
    </style:style>
    <style:style style:name="P67" style:family="paragraph" style:parent-style-name="Standard" style:list-style-name="L1">
      <style:text-properties style:font-name="Times New Roman" officeooo:rsid="0001eb8d" officeooo:paragraph-rsid="0001eb8d"/>
    </style:style>
    <style:style style:name="P68" style:family="paragraph" style:parent-style-name="Standard">
      <style:text-properties style:font-name="Times New Roman" officeooo:rsid="0001eb8d" officeooo:paragraph-rsid="0001eb8d"/>
    </style:style>
    <style:style style:name="P69" style:family="paragraph" style:parent-style-name="Standard" style:list-style-name="L2">
      <style:text-properties style:font-name="Times New Roman" officeooo:rsid="00045838" officeooo:paragraph-rsid="00045838"/>
    </style:style>
    <style:style style:name="P70" style:family="paragraph" style:parent-style-name="Standard">
      <style:text-properties style:font-name="Times New Roman" fo:font-style="normal" fo:font-weight="normal" officeooo:rsid="002edc12" officeooo:paragraph-rsid="002edc12" style:font-style-asian="normal" style:font-weight-asian="normal" style:font-style-complex="normal" style:font-weight-complex="normal"/>
    </style:style>
    <style:style style:name="P71" style:family="paragraph" style:parent-style-name="Standard" style:list-style-name="L3">
      <style:paragraph-properties>
        <style:tab-stops/>
      </style:paragraph-properties>
      <style:text-properties style:font-name="Times New Roman" fo:font-style="normal" fo:font-weight="normal" officeooo:rsid="002b01f4" officeooo:paragraph-rsid="002b01f4" style:font-style-asian="normal" style:font-weight-asian="normal" style:font-style-complex="normal" style:font-weight-complex="normal"/>
    </style:style>
    <style:style style:name="P72" style:family="paragraph" style:parent-style-name="Standard" style:list-style-name="L3">
      <style:paragraph-properties>
        <style:tab-stops/>
      </style:paragraph-properties>
      <style:text-properties style:font-name="Times New Roman" fo:font-style="normal" fo:font-weight="normal" officeooo:rsid="002b01f4" officeooo:paragraph-rsid="002c41b2" style:font-style-asian="normal" style:font-weight-asian="normal" style:font-style-complex="normal" style:font-weight-complex="normal"/>
    </style:style>
    <style:style style:name="P73" style:family="paragraph" style:parent-style-name="Standard" style:list-style-name="L3">
      <style:paragraph-properties>
        <style:tab-stops/>
      </style:paragraph-properties>
      <style:text-properties style:font-name="Times New Roman" fo:font-style="normal" fo:font-weight="normal" officeooo:rsid="002c41b2" officeooo:paragraph-rsid="002c41b2" style:font-style-asian="normal" style:font-weight-asian="normal" style:font-style-complex="normal" style:font-weight-complex="normal"/>
    </style:style>
    <style:style style:name="P74" style:family="paragraph" style:parent-style-name="Standard" style:list-style-name="L3">
      <style:paragraph-properties>
        <style:tab-stops/>
      </style:paragraph-properties>
      <style:text-properties style:font-name="Times New Roman" fo:font-style="normal" fo:font-weight="normal" officeooo:rsid="002d4f42" officeooo:paragraph-rsid="002d4f42" style:font-style-asian="normal" style:font-weight-asian="normal" style:font-style-complex="normal" style:font-weight-complex="normal"/>
    </style:style>
    <style:style style:name="P75" style:family="paragraph" style:parent-style-name="Standard">
      <style:text-properties style:font-name="Times New Roman" officeooo:rsid="003a8b85" officeooo:paragraph-rsid="003a8b85"/>
    </style:style>
    <style:style style:name="P76" style:family="paragraph" style:parent-style-name="Standard">
      <style:text-properties style:font-name="Courier New" fo:font-size="10pt" fo:font-style="normal" fo:font-weight="normal" officeooo:rsid="0009b23a" officeooo:paragraph-rsid="0027a892" style:font-size-asian="10pt" style:font-style-asian="normal" style:font-weight-asian="normal" style:font-size-complex="10pt" style:font-style-complex="normal" style:font-weight-complex="normal"/>
    </style:style>
    <style:style style:name="P77" style:family="paragraph" style:parent-style-name="Standard">
      <style:paragraph-properties fo:margin-left="1.251cm" fo:margin-right="0cm" fo:text-indent="-1.3cm" style:auto-text-indent="false">
        <style:tab-stops/>
      </style:paragraph-properties>
      <style:text-properties style:font-name="Times New Roman" fo:font-size="10pt" fo:font-style="normal" fo:font-weight="normal" officeooo:rsid="000f3a83" officeooo:paragraph-rsid="0028ab93" style:font-size-asian="10pt" style:font-style-asian="normal" style:font-weight-asian="normal" style:font-size-complex="10pt" style:font-style-complex="normal" style:font-weight-complex="normal"/>
    </style:style>
    <style:style style:name="P78" style:family="paragraph" style:parent-style-name="Standard" style:list-style-name="L3">
      <style:paragraph-properties fo:margin-left="1.251cm" fo:margin-right="0cm" fo:text-indent="-1.3cm" style:auto-text-indent="false">
        <style:tab-stops/>
      </style:paragraph-properties>
      <style:text-properties style:font-name="Times New Roman" fo:font-style="normal" fo:font-weight="normal" officeooo:rsid="002c41b2" officeooo:paragraph-rsid="002c41b2" style:font-style-asian="normal" style:font-weight-asian="normal" style:font-style-complex="normal" style:font-weight-complex="normal"/>
    </style:style>
    <style:style style:name="P79" style:family="paragraph" style:parent-style-name="Standard">
      <style:paragraph-properties fo:margin-left="1.251cm" fo:margin-right="0cm" fo:text-indent="-1.3cm" style:auto-text-indent="false">
        <style:tab-stops/>
      </style:paragraph-properties>
      <style:text-properties style:font-name="Times New Roman" officeooo:rsid="0009b23a" officeooo:paragraph-rsid="0044bfb6"/>
    </style:style>
    <style:style style:name="P80" style:family="paragraph" style:parent-style-name="Standard">
      <style:paragraph-properties fo:margin-left="1.251cm" fo:margin-right="0cm" fo:text-indent="-1.3cm" style:auto-text-indent="false">
        <style:tab-stops/>
      </style:paragraph-properties>
      <style:text-properties style:font-name="Times New Roman" fo:font-style="normal" fo:font-weight="normal" officeooo:rsid="001d60f0" officeooo:paragraph-rsid="00230afb" style:font-style-asian="normal" style:font-weight-asian="normal" style:font-style-complex="normal" style:font-weight-complex="normal"/>
    </style:style>
    <style:style style:name="P81" style:family="paragraph" style:parent-style-name="Standard">
      <style:paragraph-properties fo:margin-left="0cm" fo:margin-right="0cm" fo:text-indent="0cm" style:auto-text-indent="false">
        <style:tab-stops/>
      </style:paragraph-properties>
      <style:text-properties style:font-name="Times New Roman" fo:font-style="normal" fo:font-weight="normal" officeooo:rsid="00230afb" officeooo:paragraph-rsid="00230afb" style:font-style-asian="normal" style:font-weight-asian="normal" style:font-style-complex="normal" style:font-weight-complex="normal"/>
    </style:style>
    <style:style style:name="P82" style:family="paragraph" style:parent-style-name="Standard">
      <style:paragraph-properties fo:margin-left="0cm" fo:margin-right="0cm" fo:text-indent="0cm" style:auto-text-indent="false">
        <style:tab-stops/>
      </style:paragraph-properties>
      <style:text-properties style:font-name="Times New Roman" officeooo:rsid="0018b253" officeooo:paragraph-rsid="0018b253"/>
    </style:style>
    <style:style style:name="P83" style:family="paragraph" style:parent-style-name="Standard">
      <style:paragraph-properties fo:margin-left="0cm" fo:margin-right="0cm" fo:text-indent="0cm" style:auto-text-indent="false">
        <style:tab-stops/>
      </style:paragraph-properties>
      <style:text-properties style:font-name="Times New Roman" officeooo:rsid="003f1a39" officeooo:paragraph-rsid="003f1a39"/>
    </style:style>
    <style:style style:name="P84" style:family="paragraph" style:parent-style-name="Text_20_body">
      <style:text-properties style:font-name="Times New Roman" officeooo:paragraph-rsid="002edc12"/>
    </style:style>
    <style:style style:name="P85" style:family="paragraph" style:parent-style-name="Text_20_body">
      <style:text-properties style:font-name="Times New Roman" officeooo:rsid="002edc12" officeooo:paragraph-rsid="002edc12"/>
    </style:style>
    <style:style style:name="P86" style:family="paragraph" style:parent-style-name="Text_20_body">
      <style:text-properties style:font-name="Times New Roman" officeooo:rsid="003146de" officeooo:paragraph-rsid="003146de"/>
    </style:style>
    <style:style style:name="P87" style:family="paragraph" style:parent-style-name="Text_20_body">
      <style:text-properties style:font-name="Times New Roman" officeooo:rsid="003146de" officeooo:paragraph-rsid="00326989"/>
    </style:style>
    <style:style style:name="P88" style:family="paragraph" style:parent-style-name="Text_20_body">
      <style:text-properties style:font-name="Times New Roman" officeooo:rsid="003146de" officeooo:paragraph-rsid="003297f9"/>
    </style:style>
    <style:style style:name="P89" style:family="paragraph" style:parent-style-name="Text_20_body">
      <style:text-properties style:font-name="Times New Roman" officeooo:rsid="003146de" officeooo:paragraph-rsid="00361218"/>
    </style:style>
    <style:style style:name="P90" style:family="paragraph" style:parent-style-name="Text_20_body">
      <style:text-properties style:font-name="Times New Roman" officeooo:rsid="003146de" officeooo:paragraph-rsid="00374f7d"/>
    </style:style>
    <style:style style:name="P91" style:family="paragraph" style:parent-style-name="Text_20_body">
      <style:text-properties style:font-name="Times New Roman" officeooo:rsid="00326989" officeooo:paragraph-rsid="00326989"/>
    </style:style>
    <style:style style:name="P92" style:family="paragraph" style:parent-style-name="Text_20_body">
      <style:text-properties style:font-name="Times New Roman" officeooo:rsid="00341d20" officeooo:paragraph-rsid="00341d20"/>
    </style:style>
    <style:style style:name="P93" style:family="paragraph" style:parent-style-name="Text_20_body">
      <style:text-properties style:font-name="Times New Roman" officeooo:rsid="00341d20" officeooo:paragraph-rsid="00374f7d"/>
    </style:style>
    <style:style style:name="P94" style:family="paragraph" style:parent-style-name="Text_20_body">
      <style:text-properties style:font-name="Times New Roman" officeooo:rsid="00356fd7" officeooo:paragraph-rsid="00356fd7"/>
    </style:style>
    <style:style style:name="P95" style:family="paragraph" style:parent-style-name="Text_20_body">
      <style:text-properties style:font-name="Times New Roman" officeooo:rsid="00361218" officeooo:paragraph-rsid="003643cc"/>
    </style:style>
    <style:style style:name="P96" style:family="paragraph" style:parent-style-name="Text_20_body">
      <style:text-properties style:font-name="Times New Roman" officeooo:rsid="003a49d1" officeooo:paragraph-rsid="003a49d1"/>
    </style:style>
    <style:style style:name="P97" style:family="paragraph" style:parent-style-name="Text_20_body">
      <style:text-properties style:font-name="Courier New" fo:font-size="10pt" officeooo:rsid="003146de" officeooo:paragraph-rsid="003146de" style:font-size-asian="10pt" style:font-size-complex="10pt"/>
    </style:style>
    <style:style style:name="P98" style:family="paragraph" style:parent-style-name="Text_20_body">
      <style:text-properties style:font-name="Courier New" fo:font-size="10pt" officeooo:rsid="003146de" officeooo:paragraph-rsid="00326989" style:font-size-asian="10pt" style:font-size-complex="10pt"/>
    </style:style>
    <style:style style:name="P99" style:family="paragraph" style:parent-style-name="Text_20_body">
      <style:text-properties style:font-name="Courier New" fo:font-size="9pt" officeooo:rsid="00341d20" officeooo:paragraph-rsid="00387ba8" style:font-size-asian="9pt" style:font-size-complex="9pt"/>
    </style:style>
    <style:style style:name="P100" style:family="paragraph" style:parent-style-name="Text_20_body">
      <style:paragraph-properties fo:margin-top="0cm" fo:margin-bottom="0cm" loext:contextual-spacing="false" fo:line-height="100%"/>
      <style:text-properties style:font-name="Courier New" fo:font-size="10pt" officeooo:rsid="00361218" officeooo:paragraph-rsid="00361218" style:font-size-asian="10pt" style:font-size-complex="10pt"/>
    </style:style>
    <style:style style:name="P101" style:family="paragraph" style:parent-style-name="Text_20_body">
      <style:paragraph-properties fo:margin-top="0cm" fo:margin-bottom="0cm" loext:contextual-spacing="false" fo:line-height="100%"/>
      <style:text-properties style:font-name="Courier New" fo:font-size="10pt" officeooo:rsid="00361218" officeooo:paragraph-rsid="003643cc" style:font-size-asian="10pt" style:font-size-complex="10pt"/>
    </style:style>
    <style:style style:name="T1" style:family="text">
      <style:text-properties officeooo:rsid="0001eb8d"/>
    </style:style>
    <style:style style:name="T2" style:family="text">
      <style:text-properties officeooo:rsid="00030759"/>
    </style:style>
    <style:style style:name="T3" style:family="text">
      <style:text-properties fo:font-weight="bold" style:font-weight-asian="bold" style:font-weight-complex="bold"/>
    </style:style>
    <style:style style:name="T4" style:family="text">
      <style:text-properties fo:font-weight="bold" officeooo:rsid="001f995f" style:font-weight-asian="bold" style:font-weight-complex="bold"/>
    </style:style>
    <style:style style:name="T5" style:family="text">
      <style:text-properties fo:font-weight="bold" officeooo:rsid="00252f16" style:font-weight-asian="bold" style:font-weight-complex="bold"/>
    </style:style>
    <style:style style:name="T6" style:family="text">
      <style:text-properties fo:font-weight="bold" officeooo:rsid="004361c8" style:font-weight-asian="bold" style:font-weight-complex="bold"/>
    </style:style>
    <style:style style:name="T7" style:family="text">
      <style:text-properties officeooo:rsid="00055d2a"/>
    </style:style>
    <style:style style:name="T8" style:family="text">
      <style:text-properties fo:font-style="italic" style:font-style-asian="italic" style:font-style-complex="italic"/>
    </style:style>
    <style:style style:name="T9" style:family="text">
      <style:text-properties fo:font-style="italic" officeooo:rsid="00326989"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074b6e" style:font-style-asian="italic" style:font-weight-asian="normal" style:font-style-complex="italic" style:font-weight-complex="normal"/>
    </style:style>
    <style:style style:name="T12" style:family="text">
      <style:text-properties fo:font-style="italic" fo:font-weight="normal" officeooo:rsid="0008275e" style:font-style-asian="italic" style:font-weight-asian="normal" style:font-style-complex="italic" style:font-weight-complex="normal"/>
    </style:style>
    <style:style style:name="T13" style:family="text">
      <style:text-properties fo:font-style="italic" fo:font-weight="normal" officeooo:rsid="000cc963" style:font-style-asian="italic" style:font-weight-asian="normal" style:font-style-complex="italic" style:font-weight-complex="normal"/>
    </style:style>
    <style:style style:name="T14" style:family="text">
      <style:text-properties fo:font-style="italic" fo:font-weight="normal" officeooo:rsid="001a6855" style:font-style-asian="italic" style:font-weight-asian="normal" style:font-style-complex="italic" style:font-weight-complex="normal"/>
    </style:style>
    <style:style style:name="T15" style:family="text">
      <style:text-properties fo:font-style="italic" fo:font-weight="normal" officeooo:rsid="001c4fd0" style:font-style-asian="italic" style:font-weight-asian="normal" style:font-style-complex="italic" style:font-weight-complex="normal"/>
    </style:style>
    <style:style style:name="T16" style:family="text">
      <style:text-properties fo:font-style="italic" fo:font-weight="normal" officeooo:rsid="001d60f0" style:font-style-asian="italic" style:font-weight-asian="normal" style:font-style-complex="italic" style:font-weight-complex="normal"/>
    </style:style>
    <style:style style:name="T17" style:family="text">
      <style:text-properties fo:font-style="italic" fo:font-weight="normal" officeooo:rsid="0023f5ab" style:font-style-asian="italic" style:font-weight-asian="normal" style:font-style-complex="italic" style:font-weight-complex="normal"/>
    </style:style>
    <style:style style:name="T18" style:family="text">
      <style:text-properties fo:font-style="italic" fo:font-weight="normal" officeooo:rsid="00252f16" style:font-style-asian="italic" style:font-weight-asian="normal" style:font-style-complex="italic" style:font-weight-complex="normal"/>
    </style:style>
    <style:style style:name="T19" style:family="text">
      <style:text-properties fo:font-style="italic" fo:font-weight="normal" officeooo:rsid="0025fe0b" style:font-style-asian="italic" style:font-weight-asian="normal" style:font-style-complex="italic" style:font-weight-complex="normal"/>
    </style:style>
    <style:style style:name="T20" style:family="text">
      <style:text-properties officeooo:rsid="0006807b"/>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0e2366" style:font-style-asian="normal" style:font-weight-asian="bold" style:font-style-complex="normal" style:font-weight-complex="bold"/>
    </style:style>
    <style:style style:name="T23" style:family="text">
      <style:text-properties fo:font-style="normal" fo:font-weight="bold" officeooo:rsid="00157efe" style:font-style-asian="normal" style:font-weight-asian="bold" style:font-style-complex="normal" style:font-weight-complex="bold"/>
    </style:style>
    <style:style style:name="T24" style:family="text">
      <style:text-properties fo:font-style="normal" fo:font-weight="bold" officeooo:rsid="0018b253" style:font-style-asian="normal" style:font-weight-asian="bold" style:font-style-complex="normal" style:font-weight-complex="bold"/>
    </style:style>
    <style:style style:name="T25" style:family="text">
      <style:text-properties fo:font-style="normal" fo:font-weight="bold" officeooo:rsid="001c4fd0" style:font-style-asian="normal" style:font-weight-asian="bold" style:font-style-complex="normal" style:font-weight-complex="bold"/>
    </style:style>
    <style:style style:name="T26" style:family="text">
      <style:text-properties fo:font-style="normal" fo:font-weight="bold" officeooo:rsid="001e28e9" style:font-style-asian="normal" style:font-weight-asian="bold" style:font-style-complex="normal" style:font-weight-complex="bold"/>
    </style:style>
    <style:style style:name="T27" style:family="text">
      <style:text-properties fo:font-style="normal" fo:font-weight="bold" officeooo:rsid="00230afb" style:font-style-asian="normal" style:font-weight-asian="bold" style:font-style-complex="normal" style:font-weight-complex="bold"/>
    </style:style>
    <style:style style:name="T28" style:family="text">
      <style:text-properties fo:font-style="normal" fo:font-weight="bold" officeooo:rsid="0028ab93" style:font-style-asian="normal" style:font-weight-asian="bold" style:font-style-complex="normal" style:font-weight-complex="bold"/>
    </style:style>
    <style:style style:name="T29" style:family="text">
      <style:text-properties fo:font-style="normal" fo:font-weight="bold" officeooo:rsid="002929f2" style:font-style-asian="normal" style:font-weight-asian="bold" style:font-style-complex="normal" style:font-weight-complex="bold"/>
    </style:style>
    <style:style style:name="T30" style:family="text">
      <style:text-properties fo:font-style="normal" fo:font-weight="bold" officeooo:rsid="00427735"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074b6e" style:font-style-asian="normal" style:font-weight-asian="normal" style:font-style-complex="normal" style:font-weight-complex="normal"/>
    </style:style>
    <style:style style:name="T33" style:family="text">
      <style:text-properties fo:font-style="normal" fo:font-weight="normal" officeooo:rsid="0009b23a" style:font-style-asian="normal" style:font-weight-asian="normal" style:font-style-complex="normal" style:font-weight-complex="normal"/>
    </style:style>
    <style:style style:name="T34" style:family="text">
      <style:text-properties fo:font-style="normal" fo:font-weight="normal" officeooo:rsid="000b38d5" style:font-style-asian="normal" style:font-weight-asian="normal" style:font-style-complex="normal" style:font-weight-complex="normal"/>
    </style:style>
    <style:style style:name="T35" style:family="text">
      <style:text-properties fo:font-style="normal" fo:font-weight="normal" officeooo:rsid="000da208" style:font-style-asian="normal" style:font-weight-asian="normal" style:font-style-complex="normal" style:font-weight-complex="normal"/>
    </style:style>
    <style:style style:name="T36" style:family="text">
      <style:text-properties fo:font-style="normal" fo:font-weight="normal" officeooo:rsid="000e2366" style:font-style-asian="normal" style:font-weight-asian="normal" style:font-style-complex="normal" style:font-weight-complex="normal"/>
    </style:style>
    <style:style style:name="T37" style:family="text">
      <style:text-properties fo:font-style="normal" fo:font-weight="normal" officeooo:rsid="000f3a83" style:font-style-asian="normal" style:font-weight-asian="normal" style:font-style-complex="normal" style:font-weight-complex="normal"/>
    </style:style>
    <style:style style:name="T38" style:family="text">
      <style:text-properties fo:font-style="normal" fo:font-weight="normal" officeooo:rsid="0010d1ef" style:font-style-asian="normal" style:font-weight-asian="normal" style:font-style-complex="normal" style:font-weight-complex="normal"/>
    </style:style>
    <style:style style:name="T39" style:family="text">
      <style:text-properties fo:font-style="normal" fo:font-weight="normal" officeooo:rsid="001116f3" style:font-style-asian="normal" style:font-weight-asian="normal" style:font-style-complex="normal" style:font-weight-complex="normal"/>
    </style:style>
    <style:style style:name="T40" style:family="text">
      <style:text-properties fo:font-style="normal" fo:font-weight="normal" officeooo:rsid="001282dd" style:font-style-asian="normal" style:font-weight-asian="normal" style:font-style-complex="normal" style:font-weight-complex="normal"/>
    </style:style>
    <style:style style:name="T41" style:family="text">
      <style:text-properties fo:font-style="normal" fo:font-weight="normal" officeooo:rsid="0013b3bc" style:font-style-asian="normal" style:font-weight-asian="normal" style:font-style-complex="normal" style:font-weight-complex="normal"/>
    </style:style>
    <style:style style:name="T42" style:family="text">
      <style:text-properties fo:font-style="normal" fo:font-weight="normal" officeooo:rsid="0016a992" style:font-style-asian="normal" style:font-weight-asian="normal" style:font-style-complex="normal" style:font-weight-complex="normal"/>
    </style:style>
    <style:style style:name="T43" style:family="text">
      <style:text-properties fo:font-style="normal" fo:font-weight="normal" officeooo:rsid="0018b253" style:font-style-asian="normal" style:font-weight-asian="normal" style:font-style-complex="normal" style:font-weight-complex="normal"/>
    </style:style>
    <style:style style:name="T44" style:family="text">
      <style:text-properties fo:font-style="normal" fo:font-weight="normal" officeooo:rsid="001a6855" style:font-style-asian="normal" style:font-weight-asian="normal" style:font-style-complex="normal" style:font-weight-complex="normal"/>
    </style:style>
    <style:style style:name="T45" style:family="text">
      <style:text-properties fo:font-style="normal" fo:font-weight="normal" officeooo:rsid="001af3ec" style:font-style-asian="normal" style:font-weight-asian="normal" style:font-style-complex="normal" style:font-weight-complex="normal"/>
    </style:style>
    <style:style style:name="T46" style:family="text">
      <style:text-properties fo:font-style="normal" fo:font-weight="normal" officeooo:rsid="001c4fd0" style:font-style-asian="normal" style:font-weight-asian="normal" style:font-style-complex="normal" style:font-weight-complex="normal"/>
    </style:style>
    <style:style style:name="T47" style:family="text">
      <style:text-properties fo:font-style="normal" fo:font-weight="normal" officeooo:rsid="001d60f0" style:font-style-asian="normal" style:font-weight-asian="normal" style:font-style-complex="normal" style:font-weight-complex="normal"/>
    </style:style>
    <style:style style:name="T48" style:family="text">
      <style:text-properties fo:font-style="normal" fo:font-weight="normal" officeooo:rsid="001e28e9" style:font-style-asian="normal" style:font-weight-asian="normal" style:font-style-complex="normal" style:font-weight-complex="normal"/>
    </style:style>
    <style:style style:name="T49" style:family="text">
      <style:text-properties fo:font-style="normal" fo:font-weight="normal" officeooo:rsid="001ddeb4" style:font-style-asian="normal" style:font-weight-asian="normal" style:font-style-complex="normal" style:font-weight-complex="normal"/>
    </style:style>
    <style:style style:name="T50" style:family="text">
      <style:text-properties fo:font-style="normal" fo:font-weight="normal" officeooo:rsid="001f995f" style:font-style-asian="normal" style:font-weight-asian="normal" style:font-style-complex="normal" style:font-weight-complex="normal"/>
    </style:style>
    <style:style style:name="T51" style:family="text">
      <style:text-properties fo:font-style="normal" fo:font-weight="normal" officeooo:rsid="0021113d" style:font-style-asian="normal" style:font-weight-asian="normal" style:font-style-complex="normal" style:font-weight-complex="normal"/>
    </style:style>
    <style:style style:name="T52" style:family="text">
      <style:text-properties fo:font-style="normal" fo:font-weight="normal" officeooo:rsid="0023f5ab" style:font-style-asian="normal" style:font-weight-asian="normal" style:font-style-complex="normal" style:font-weight-complex="normal"/>
    </style:style>
    <style:style style:name="T53" style:family="text">
      <style:text-properties fo:font-style="normal" fo:font-weight="normal" officeooo:rsid="00252f16" style:font-style-asian="normal" style:font-weight-asian="normal" style:font-style-complex="normal" style:font-weight-complex="normal"/>
    </style:style>
    <style:style style:name="T54" style:family="text">
      <style:text-properties fo:font-style="normal" fo:font-weight="normal" officeooo:rsid="0025fe0b" style:font-style-asian="normal" style:font-weight-asian="normal" style:font-style-complex="normal" style:font-weight-complex="normal"/>
    </style:style>
    <style:style style:name="T55" style:family="text">
      <style:text-properties fo:font-style="normal" fo:font-weight="normal" officeooo:rsid="0027a892" style:font-style-asian="normal" style:font-weight-asian="normal" style:font-style-complex="normal" style:font-weight-complex="normal"/>
    </style:style>
    <style:style style:name="T56" style:family="text">
      <style:text-properties fo:font-style="normal" fo:font-weight="normal" officeooo:rsid="0028ab93" style:font-style-asian="normal" style:font-weight-asian="normal" style:font-style-complex="normal" style:font-weight-complex="normal"/>
    </style:style>
    <style:style style:name="T57" style:family="text">
      <style:text-properties fo:font-style="normal" fo:font-weight="normal" officeooo:rsid="002929f2" style:font-style-asian="normal" style:font-weight-asian="normal" style:font-style-complex="normal" style:font-weight-complex="normal"/>
    </style:style>
    <style:style style:name="T58" style:family="text">
      <style:text-properties fo:font-style="normal" fo:font-weight="normal" officeooo:rsid="004361c8"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fo:font-style="normal" officeooo:rsid="00074b6e" style:font-style-asian="normal" style:font-style-complex="normal"/>
    </style:style>
    <style:style style:name="T61" style:family="text">
      <style:text-properties style:font-name="Courier New" fo:font-style="normal" fo:font-weight="bold" officeooo:rsid="0016a992" style:font-style-asian="normal" style:font-weight-asian="bold" style:font-style-complex="normal" style:font-weight-complex="bold"/>
    </style:style>
    <style:style style:name="T62" style:family="text">
      <style:text-properties style:font-name="Courier New" fo:font-style="normal" fo:font-weight="bold" officeooo:rsid="001d60f0" style:font-style-asian="normal" style:font-weight-asian="bold" style:font-style-complex="normal" style:font-weight-complex="bold"/>
    </style:style>
    <style:style style:name="T63" style:family="text">
      <style:text-properties style:font-name="Courier New" fo:font-style="normal" fo:font-weight="normal" style:font-style-asian="normal" style:font-weight-asian="normal" style:font-style-complex="normal" style:font-weight-complex="normal"/>
    </style:style>
    <style:style style:name="T64" style:family="text">
      <style:text-properties fo:font-size="10pt" fo:font-style="normal" fo:font-weight="normal" officeooo:rsid="0009b23a" style:font-size-asian="10pt" style:font-style-asian="normal" style:font-weight-asian="normal" style:font-size-complex="10pt" style:font-style-complex="normal" style:font-weight-complex="normal"/>
    </style:style>
    <style:style style:name="T65" style:family="text">
      <style:text-properties officeooo:rsid="001e28e9"/>
    </style:style>
    <style:style style:name="T66" style:family="text">
      <style:text-properties officeooo:rsid="001f995f"/>
    </style:style>
    <style:style style:name="T67" style:family="text">
      <style:text-properties officeooo:rsid="00252f16"/>
    </style:style>
    <style:style style:name="T68" style:family="text">
      <style:text-properties officeooo:rsid="0027a892"/>
    </style:style>
    <style:style style:name="T69" style:family="text">
      <style:text-properties style:font-name="Times New Roman" fo:font-weight="bold" officeooo:rsid="002929f2" style:font-weight-asian="bold" style:font-weight-complex="bold"/>
    </style:style>
    <style:style style:name="T70" style:family="text">
      <style:text-properties officeooo:rsid="0029965d"/>
    </style:style>
    <style:style style:name="T71" style:family="text">
      <style:text-properties officeooo:rsid="002c41b2"/>
    </style:style>
    <style:style style:name="T72" style:family="text">
      <style:text-properties officeooo:rsid="002d4f42"/>
    </style:style>
    <style:style style:name="T73" style:family="text">
      <style:text-properties officeooo:rsid="003146de"/>
    </style:style>
    <style:style style:name="T74" style:family="text">
      <style:text-properties officeooo:rsid="00326989"/>
    </style:style>
    <style:style style:name="T75" style:family="text">
      <style:text-properties officeooo:rsid="003297f9"/>
    </style:style>
    <style:style style:name="T76" style:family="text">
      <style:text-properties officeooo:rsid="00341d20"/>
    </style:style>
    <style:style style:name="T77" style:family="text">
      <style:text-properties officeooo:rsid="00356fd7"/>
    </style:style>
    <style:style style:name="T78" style:family="text">
      <style:text-properties officeooo:rsid="00361218"/>
    </style:style>
    <style:style style:name="T79" style:family="text">
      <style:text-properties officeooo:rsid="003643cc"/>
    </style:style>
    <style:style style:name="T80" style:family="text">
      <style:text-properties officeooo:rsid="00374f7d"/>
    </style:style>
    <style:style style:name="T81" style:family="text">
      <style:text-properties officeooo:rsid="003a8b85"/>
    </style:style>
    <style:style style:name="T82" style:family="text">
      <style:text-properties officeooo:rsid="003eebe3"/>
    </style:style>
    <style:style style:name="T83" style:family="text">
      <style:text-properties officeooo:rsid="004361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Popup Framework <text:span text:style-name="T2">I</text:span>n <text:span text:style-name="T2">V</text:span>anilla <text:span text:style-name="T2">J</text:span>ava<text:span text:style-name="T2">s</text:span>cript</text:p>
      <text:p text:style-name="P6"/>
      <text:h text:style-name="P62" text:outline-level="1">Features</text:h>
      <text:p text:style-name="P6"/>
      <text:list xml:id="list3361210506" text:style-name="L1">
        <text:list-item>
          <text:p text:style-name="P66">highly customizable</text:p>
          <text:list>
            <text:list-item>
              <text:p text:style-name="P67">any number of different popup templates can be created using html/css</text:p>
            </text:list-item>
            <text:list-item>
              <text:p text:style-name="P67">the behaviour of each popup can be customized at a well defined area of the script</text:p>
            </text:list-item>
          </text:list>
        </text:list-item>
        <text:list-item>
          <text:p text:style-name="P66">nested popups</text:p>
        </text:list-item>
        <text:list-item>
          <text:p text:style-name="P66">one popup instance handles one popup at the time but allows to switch between different popups and already provides basic functionality</text:p>
        </text:list-item>
        <text:list-item>
          <text:p text:style-name="P67">refresh of popus is provided on orientation change allowing adjustment of position and size</text:p>
        </text:list-item>
        <text:list-item>
          <text:p text:style-name="P66">multiple popups including nested popups can be implemented by creating multiple instances</text:p>
        </text:list-item>
        <text:list-item>
          <text:p text:style-name="P66">a manager is provided to handle a popup family where an unlimited number of popups can be handled allowing the user to individually popup and down each popup, remove all at once and <text:span text:style-name="T1">t</text:span>o bring each one to the top. <text:span text:style-name="T1">Each popup will be at a different z-level</text:span></text:p>
        </text:list-item>
        <text:list-item>
          <text:p text:style-name="P67">additionaly multiple popup families can be created.</text:p>
        </text:list-item>
      </text:list>
      <text:p text:style-name="P7"/>
      <text:p text:style-name="P75">The basic implementation uses dynamic creation and removal of DOM objects from a template (html template tag) as well as switching visibility using the css display property. Each popup object is imbedded in an instance of the javascript class popupSet.</text:p>
      <text:p text:style-name="P7"/>
      <text:h text:style-name="P62" text:outline-level="1">Components</text:h>
      <text:p text:style-name="P8"/>
      <text:p text:style-name="P8">The system consists of three components.</text:p>
      <text:list xml:id="list1369676592" text:style-name="L2">
        <text:list-item>
          <text:p text:style-name="P69">An HTML/CSS part where the <text:span text:style-name="T3">template</text:span> for the different popup elements are defined. <text:span text:style-name="T7">Any popup form can be defined. </text:span></text:p>
        </text:list-item>
        <text:list-item>
          <text:p text:style-name="P69">The javascript <text:span text:style-name="T8">class</text:span> <text:span text:style-name="T3">popupSet</text:span> with the basic functionality for the popup/popdown of the popups defined in the template. </text:p>
        </text:list-item>
        <text:list-item>
          <text:p text:style-name="P69">The optional javascript <text:span text:style-name="T8">class</text:span> <text:span text:style-name="T3">popupMgr</text:span> <text:span text:style-name="T7">to dynamically handle multiple concurrent popups.</text:span></text:p>
        </text:list-item>
      </text:list>
      <text:p text:style-name="P8"/>
      <text:h text:style-name="P62" text:outline-level="1">Popup Templates</text:h>
      <text:p text:style-name="P9"/>
      <text:p text:style-name="P9">The templates for the popups must be placed in a specific wrapper:</text:p>
      <text:p text:style-name="P9"/>
      <text:p text:style-name="P2">&lt;template id="popupElements"&gt;&lt;section id="popupElementsSection"&gt;</text:p>
      <text:p text:style-name="P1">&lt;<text:span text:style-name="T3">div</text:span> id="popup1"&gt;</text:p>
      <text:p text:style-name="P1"><text:tab/>&lt;!-- 1. popup <text:span text:style-name="T20">template</text:span>--&gt;</text:p>
      <text:p text:style-name="P1">&lt;<text:span text:style-name="T3">/div</text:span>&gt;</text:p>
      <text:p text:style-name="P1">&lt;<text:span text:style-name="T3">div</text:span> id="popup2"&gt;</text:p>
      <text:p text:style-name="P1"><text:tab/>&lt;!-- 2. popup <text:span text:style-name="T20">template</text:span>--&gt;</text:p>
      <text:p text:style-name="P1">&lt;<text:span text:style-name="T3">/div</text:span>&gt;</text:p>
      <text:p text:style-name="P1"><text:soft-page-break/>&lt;<text:span text:style-name="T3">div</text:span> id="popup3"&gt;</text:p>
      <text:p text:style-name="P1"><text:tab/>&lt;!-- 3. popup <text:span text:style-name="T20">template</text:span>--&gt;</text:p>
      <text:p text:style-name="P1">&lt;<text:span text:style-name="T3">/div</text:span>&gt;</text:p>
      <text:p text:style-name="P1">&lt;!-- more templates--&gt;</text:p>
      <text:p text:style-name="P2">&lt;/section&gt;&lt;/template&gt;</text:p>
      <text:p text:style-name="P9"/>
      <text:p text:style-name="P16">The <text:span text:style-name="T8">template/section</text:span> tags for the wrapper should be kept in one line back to back. This avoids orphan text DOM elements when removing the popup from the DOM. Each popup template must be a <text:span text:style-name="T8">div </text:span><text:span text:style-name="T31">containing just content or any html structure. </text:span><text:span text:style-name="T32">Formatting can be done with css classes or inline. The id’s of the wrapper tags should not be changed. The id’s of the </text:span><text:span text:style-name="T11">div</text:span><text:span text:style-name="T32">’s will be helpful to identify the popup that will be used. Their naming is freely customizable.</text:span></text:p>
      <text:p text:style-name="P17"><text:span text:style-name="T32">I</text:span><text:span text:style-name="T31">f the popup should have a close button include: </text:span></text:p>
      <text:p text:style-name="P17"><text:span text:style-name="T63">&lt;span class="closeBtn"&gt;&amp;#x2716;&lt;/span&gt;</text:span><text:span text:style-name="T31"> </text:span></text:p>
      <text:p text:style-name="P17"><text:span text:style-name="T31">Important is that it includes the class name </text:span><text:span text:style-name="T10">closeBtn</text:span><text:span text:style-name="T31"> as the framework will attach an event listener to the element based on this class name. The class itself may be modified if required. The configuration in the example will place the close button in the upper left corner of the parent.</text:span></text:p>
      <text:p text:style-name="P70"/>
      <text:p text:style-name="P15"/>
      <text:h text:style-name="P63" text:outline-level="1"><text:span text:style-name="T60">P</text:span><text:span text:style-name="T59">opupSet Class</text:span></text:h>
      <text:p text:style-name="P11"/>
      <text:p text:style-name="P11">This javascript class provides all functionality to handle the popups. Each instance of this class will handle one concurrent popup of any of the defined popup templates. It can also freely switch between the different templates. A new popup will pop down an active popup of this instance before popping up the next popup. </text:p>
      <text:p text:style-name="P11"/>
      <text:p text:style-name="P10"><text:span text:style-name="T31">When creating an instance of the popupSet class a DOM object for the popup set consisting of </text:span><text:span text:style-name="T35">a section object with each</text:span><text:span text:style-name="T31"> specified </text:span><text:span text:style-name="T35">popup </text:span><text:span text:style-name="T31">template </text:span><text:span text:style-name="T35">(div element)</text:span><text:span text:style-name="T31"> </text:span><text:span text:style-name="T35">as a child</text:span><text:span text:style-name="T31"> is created as child of document.body. </text:span><text:span text:style-name="T34">For each popup div the following attributes are set: </text:span><text:span text:style-name="T12">display: none; position: fixed; opacity: 0; z-index: </text:span><text:span text:style-name="T13">zLevel</text:span><text:span text:style-name="T12">;</text:span></text:p>
      <text:p text:style-name="P12"/>
      <text:p text:style-name="P11">An instance is created with:</text:p>
      <text:p text:style-name="P11"/>
      <text:p text:style-name="P3"><text:span text:style-name="T31">myPopupInstance = new popupSet(</text:span><text:span text:style-name="T33">instanceId, zLevel, optional_callback_function);</text:span></text:p>
      <text:p text:style-name="P13"/>
      <text:p text:style-name="P18"><text:span text:style-name="T21">instanceId</text:span><text:span text:style-name="T31">: must be different for each instance. It is needed to identify </text:span><text:span text:style-name="T35">the DOM section object for this instance.</text:span></text:p>
      <text:p text:style-name="P20"><text:span text:style-name="T22">z</text:span><text:span text:style-name="T21">level</text:span><text:span text:style-name="T31">: the initial z-level of the popup set.</text:span></text:p>
      <text:p text:style-name="P20"><text:span text:style-name="T21">optional_callback_function</text:span><text:span text:style-name="T31">: if provided this function will be called on a final popdown and </text:span><text:span text:style-name="T36">on a click on the popup content. The function will be called with </text:span><text:span text:style-name="T37">the instance object (this) as first parameter and as second parameter with the string “toTop” in case of a click on the popup or “popdown” in case of a final popdown. Typical actions of this function could be to </text:span><text:span text:style-name="T38">b</text:span><text:span text:style-name="T37">ring the popup to the top relativ to other popup instances or to do cleanup of the instance.</text:span></text:p>
      <text:p text:style-name="P30"/>
      <text:p text:style-name="P30"/>
      <text:h text:style-name="Heading_20_2" text:outline-level="2">Methods of the popupSet Class</text:h>
      <text:p text:style-name="P5">modalClick(event,type,paramSet)</text:p>
      <text:p text:style-name="P11"><text:soft-page-break/></text:p>
      <text:p text:style-name="P14">Invokes a popup of the popup specified by type, replaces an active popup by a new popup or invokes a popdown of the active popup.</text:p>
      <text:p text:style-name="P14"/>
      <text:p text:style-name="P22"><text:span text:style-name="T21">event</text:span><text:span text:style-name="T31">: here either the event object (event) or the clicked element (this) can be passed. In most cases </text:span><text:span text:style-name="T39">passing the event is preferrable as it allows to stop the propagation of the event and avoid unwanted eventhandler calls. Additionally it makes the exact click position available. Internally the method will then get the clicked element from the click event as it for most cases provides essential information for the popup like position and content related information e.g. if the popup is used to zoom up a picture from a gallery. </text:span><text:span text:style-name="T40">If a DOM element (this) is passed event propagation can not be stopped and click position will not be available.</text:span></text:p>
      <text:p text:style-name="P25"><text:span text:style-name="T21">type</text:span><text:span text:style-name="T31">: a free choosable string to select in a </text:span><text:span text:style-name="T10">case</text:span><text:span text:style-name="T31"> statement the apropriate customized handling of the specific popup.</text:span></text:p>
      <text:p text:style-name="P26"><text:span text:style-name="T21">ParamSet</text:span><text:span text:style-name="T31">: an object e.g. an array with additional parameters for the specific popup e.g. content.</text:span></text:p>
      <text:p text:style-name="P31"/>
      <text:p text:style-name="P41">If the popup of this instance is active and the method is called with the same event parameter (click on the same element on the screen) a popdown is invoked.</text:p>
      <text:p text:style-name="P41"/>
      <text:p text:style-name="P40"><text:span text:style-name="T41">If the popup of this instance is active and the method is called with </text:span><text:span text:style-name="T42">a different </text:span><text:span text:style-name="T41">event parameter </text:span><text:span text:style-name="T42">(click on a different element on the screen) the active popup is replaced by a new popup.</text:span></text:p>
      <text:p text:style-name="P41"/>
      <text:p text:style-name="P41">A call of the method without any parameters will cause a popdown if the popup is active.</text:p>
      <text:p text:style-name="P41"/>
      <text:p text:style-name="P50"><text:span text:style-name="T31">chgLevel(id,</text:span><text:span text:style-name="T64">zLevel</text:span><text:span text:style-name="T31">)</text:span></text:p>
      <text:p text:style-name="P41"/>
      <text:p text:style-name="P42">Changes the z-level of the popup e.g. to bring it on top. Also a new id for the popup set can be provided.</text:p>
      <text:p text:style-name="P42"><text:s/></text:p>
      <text:p text:style-name="P23"><text:span text:style-name="T23">id</text:span><text:span text:style-name="T31">: </text:span><text:span text:style-name="T42">new id of the section element in the DOM containing the popup templates</text:span></text:p>
      <text:p text:style-name="P27"><text:span text:style-name="T61">zLevel</text:span><text:span text:style-name="T31">: </text:span><text:span text:style-name="T42">new z-level of the popup.</text:span></text:p>
      <text:p text:style-name="P41"/>
      <text:p text:style-name="P51"><text:span text:style-name="T41">i</text:span><text:span text:style-name="T31">sSameTarget(event)</text:span></text:p>
      <text:p text:style-name="P42"/>
      <text:p text:style-name="P42">returns true if event is the same as the event passed in the last modalClick call.</text:p>
      <text:p text:style-name="P42"/>
      <text:p text:style-name="P28"><text:span text:style-name="T24">event</text:span><text:span text:style-name="T31">: </text:span><text:span text:style-name="T43">same as in modalClick</text:span></text:p>
      <text:p text:style-name="P43"/>
      <text:p text:style-name="P52"><text:span text:style-name="T43">d</text:span><text:span text:style-name="T31">estructor()</text:span></text:p>
      <text:p text:style-name="P43"/>
      <text:p text:style-name="P43">cleanup of all instance related data objects in the DOM and pending event listeners.</text:p>
      <text:p text:style-name="P43"/>
      <text:h text:style-name="Heading_20_2" text:outline-level="2">User interaction</text:h>
      <text:p text:style-name="P57">The popup elements have the following behavi<text:span text:style-name="T71">o</text:span>ur on user interaction</text:p>
      <text:list xml:id="list845141041" text:style-name="L3">
        <text:list-item>
          <text:p text:style-name="P71">clicking on the element with the onclick call that initiated the popup while the popup is up will lead to a popdown</text:p>
        </text:list-item>
        <text:list-item>
          <text:p text:style-name="P71"><text:soft-page-break/>clicking on the popup <text:span text:style-name="T72">without doing a selection </text:span>will pop it down and <text:span text:style-name="T72">if provided </text:span>will call a callback function <text:span text:style-name="T72">with a customized action.</text:span></text:p>
        </text:list-item>
        <text:list-item>
          <text:p text:style-name="P73">clicking on the close button if provided will pop it down</text:p>
        </text:list-item>
        <text:list-item>
          <text:p text:style-name="P73">clicking anywhere on the body will pop it down</text:p>
        </text:list-item>
        <text:list-item>
          <text:p text:style-name="P73">changing orientation of the screen will execute a customizable action e.g. refresh the popup with possible adjustments to the different viewport dimensions</text:p>
        </text:list-item>
      </text:list>
      <text:p text:style-name="P48"/>
      <text:p text:style-name="P43"/>
      <text:p text:style-name="P43"/>
      <text:h text:style-name="P64" text:outline-level="1">PopupMgr Class</text:h>
      <text:p text:style-name="P55">The methods of this class manage multiple instances of the popupSet class and therefor multple concurrent popups <text:span text:style-name="T68">which we will call a popup family. </text:span></text:p>
      <text:p text:style-name="P56">An instance which can manage one popup family is created with the following call:</text:p>
      <text:p text:style-name="P4"><text:span text:style-name="T31">myPopup</text:span><text:span text:style-name="T55">family</text:span><text:span text:style-name="T31"> = new popup</text:span><text:span text:style-name="T55">Mgr</text:span><text:span text:style-name="T31">(</text:span><text:span text:style-name="T55">family_name</text:span><text:span text:style-name="T33">, </text:span><text:span text:style-name="T55">base_</text:span><text:span text:style-name="T33">zLevel</text:span><text:span text:style-name="T55">)</text:span><text:span text:style-name="T33">;</text:span></text:p>
      <text:p text:style-name="P76"/>
      <text:p text:style-name="P19"><text:span text:style-name="T28">family_name</text:span><text:span text:style-name="T31">: </text:span><text:span text:style-name="T56">a freely choosable string which will be used as prefix in the id’s of the related DOM objects</text:span></text:p>
      <text:p text:style-name="P21"><text:span text:style-name="T28">base_</text:span><text:span text:style-name="T22">z</text:span><text:span text:style-name="T28">L</text:span><text:span text:style-name="T21">evel</text:span><text:span text:style-name="T31">: </text:span><text:span text:style-name="T56">integer number: </text:span><text:span text:style-name="T31">the </text:span><text:span text:style-name="T56">popups of the family will have z-levels equal or greater than this value</text:span></text:p>
      <text:p text:style-name="P77"/>
      <text:p text:style-name="P47">There is a single public method popupClick which opens a new popup or closes all popups</text:p>
      <text:p text:style-name="P47"/>
      <text:p text:style-name="P53">popupClick(event, level, type, paramSet)</text:p>
      <text:p text:style-name="P47"/>
      <text:p text:style-name="P79"><text:span text:style-name="T29">event</text:span><text:span text:style-name="T31">: </text:span><text:span text:style-name="T57">the event or element object as described for the </text:span><text:span text:style-name="T58">modalClick</text:span><text:span text:style-name="T57"> method of the popupSet class and will be passed to that method.</text:span></text:p>
      <text:p text:style-name="P34"><text:span text:style-name="T69">level</text:span>: <text:span text:style-name="T70">level = 0: a popup at the base z-level of the family is created<text:line-break/>level &gt; 0: <text:s/>a popup at the specified level is created.<text:line-break/>level = -1: a popup above all other popups is created and will be on top of all others</text:span></text:p>
      <text:p text:style-name="P35"><text:span text:style-name="T3">type </text:span><text:span text:style-name="T83">and</text:span><text:span text:style-name="T6"> paramSet</text:span>: type <text:span text:style-name="T83">and parameters </text:span>of popup as described in the popupSet class, will be passed to the <text:span text:style-name="T83">modalClick method of the popupSet class.</text:span></text:p>
      <text:p text:style-name="P35"/>
      <text:p text:style-name="P35"/>
      <text:h text:style-name="P59" text:outline-level="2">User interaction</text:h>
      <text:p text:style-name="P58">The popup elements have the following behavi<text:span text:style-name="T71">o</text:span>ur on user interaction</text:p>
      <text:list xml:id="list182760449164734" text:continue-numbering="true" text:style-name="L3">
        <text:list-item>
          <text:p text:style-name="P72">clicking on the element with the onclick call that initiated the popup while the popup is up will lead to a popdown</text:p>
        </text:list-item>
        <text:list-item>
          <text:p text:style-name="P72">clicking on the popup will <text:span text:style-name="T71">bring it to the top or if it is on top </text:span>pop it down <text:span text:style-name="T72">if user is not doing a selection in the popup</text:span>.</text:p>
        </text:list-item>
        <text:list-item>
          <text:p text:style-name="P73">clicking on the close button if provided will pop it down</text:p>
        </text:list-item>
        <text:list-item>
          <text:p text:style-name="P73">clicking anywhere on the body will pop down all popups</text:p>
        </text:list-item>
        <text:list-item>
          <text:p text:style-name="P74">changing the orientation of the screen will lead to a customizable action e.g. refresch with adjustments to new screen dimensions</text:p>
          <text:p text:style-name="P78"/>
        </text:list-item>
      </text:list>
      <text:h text:style-name="Heading_20_1" text:outline-level="1"><text:soft-page-break/>Customization</text:h>
      <text:p text:style-name="P43"/>
      <text:p text:style-name="P43">Customization occurs in two places. </text:p>
      <text:p text:style-name="P43"/>
      <text:h text:style-name="Heading_20_2" text:outline-level="2">html/css part</text:h>
      <text:p text:style-name="P43"/>
      <text:p text:style-name="P82"><text:span text:style-name="T31">In the html/css part the look and feel of the popups is defined. Each different popup type gets its own div element </text:span><text:span text:style-name="T45">with an id attribute</text:span><text:span text:style-name="T31"> </text:span><text:span text:style-name="T44">inside the template/section wrapper</text:span><text:span text:style-name="T31"> which ite</text:span><text:span text:style-name="T44">r</text:span><text:span text:style-name="T31">nally may </text:span><text:span text:style-name="T45">then </text:span><text:span text:style-name="T31">have any structure. </text:span><text:span text:style-name="T45">The id is freely choosable. </text:span><text:span text:style-name="T44">If the popup should have a close button this button must have a class called </text:span><text:span text:style-name="T14">.closeBtn.</text:span><text:span text:style-name="T45">The framework will then attach an eventlistener for a click on the button.</text:span></text:p>
      <text:p text:style-name="P82"><text:span text:style-name="T45"/></text:p>
      <text:p text:style-name="P83"><text:span text:style-name="T45">D</text:span><text:span text:style-name="T31">on’t use inline styling (style=” <text:s/>“) as this will not be copied from the template to the actual DOM object.</text:span></text:p>
      <text:p text:style-name="P44"/>
      <text:h text:style-name="Heading_20_2" text:outline-level="2"><text:span text:style-name="T65">J</text:span>avascript class popupSet </text:h>
      <text:p text:style-name="P49"><text:span text:style-name="T31">In tha java script class popupSet the case statement in the methods </text:span><text:span text:style-name="T10">mod</text:span><text:span text:style-name="T16">a</text:span><text:span text:style-name="T10">lClick</text:span><text:span text:style-name="T31"> and <text:s/></text:span><text:span text:style-name="T10">modalRefresh</text:span><text:span text:style-name="T31"> need to be populated with the specific code to position the popup, to provide the content </text:span><text:span text:style-name="T51">and to make the popup visible</text:span><text:span text:style-name="T31">. </text:span><text:span text:style-name="T46">The code can use the following information:</text:span></text:p>
      <text:p text:style-name="P24"><text:span text:style-name="T25">element</text:span><text:span text:style-name="T31">: </text:span><text:span text:style-name="T46">DOM object of th clicked element. It provides the position and dimansions of the element (</text:span><text:span text:style-name="T15">element.getBoundingClientRect()</text:span><text:span text:style-name="T46"> ), the content of the element </text:span><text:span text:style-name="T47">e.g. text or url of an image including dimensions of the image. </text:span></text:p>
      <text:p text:style-name="P39"><text:span text:style-name="T21">this.#DOMnode</text:span><text:span text:style-name="T31">: the DOM object of the wrapper for the popup div elements. Use the method </text:span><text:span text:style-name="T10">this.#DOMnode.querySelector(“#id”&gt;) </text:span><text:span text:style-name="T31">to get to the node of the specific popup type </text:span><text:span text:style-name="T48">and if required the nodes of child elements that need to be filled with content.</text:span></text:p>
      <text:p text:style-name="P29"><text:span text:style-name="T62">VpWidth, vpHeight</text:span><text:span text:style-name="T46">: </text:span><text:span text:style-name="T47">dimensions of the current viewport. </text:span></text:p>
      <text:p text:style-name="P36"><text:span text:style-name="T21">paramSet</text:span><text:span text:style-name="T31">: the popup type specific additional information passed to the modalClick method</text:span></text:p>
      <text:p text:style-name="P36"><text:span text:style-name="T21">clickPos.x, clickPos.</text:span><text:span text:style-name="T30">y</text:span><text:span text:style-name="T31">: the exact click position in the viewport.</text:span></text:p>
      <text:p text:style-name="P44"/>
      <text:p text:style-name="P46">In the popup specific code the following class attributes should be set:</text:p>
      <text:p text:style-name="P37"><text:span text:style-name="T26">this.#modal</text:span><text:span text:style-name="T31">: </text:span><text:span text:style-name="T48">the node of the specific popup type returned by </text:span><text:span text:style-name="T49">this.#DOMnode.querySelector(“#id”&gt;). </text:span><text:span text:style-name="T50">The id would be one of the div id’s which are a direct child of the template/section wrapper. This attribute is required for the pop down.</text:span></text:p>
      <text:p text:style-name="P32"><text:span text:style-name="T4">this.#lastP</text:span><text:span text:style-name="T3">aramSet</text:span>: <text:span text:style-name="T66">a copy of paramSet or a calculated modification to be used in case of a refresh of the popup if orientation is changed</text:span></text:p>
      <text:p text:style-name="P32"/>
      <text:p text:style-name="P81">the following private methods can be used:</text:p>
      <text:p text:style-name="P45"/>
      <text:p text:style-name="P38"><text:span text:style-name="T26">this.#</text:span><text:span text:style-name="T27">cssShowAt(display, top, left, width, height, moreProperties)</text:span><text:span text:style-name="T31">: </text:span><text:span text:style-name="T52">returns a css <text:s/>property setting string to set the css properties display, top, left and optionally width and height. The last parameter can be used to set any other properties provided in correct css syntax. The returned string will </text:span><text:span text:style-name="T53">include</text:span><text:span text:style-name="T52"> </text:span><text:span text:style-name="T53">the following property </text:span><text:span text:style-name="T52">settings </text:span><text:span text:style-name="T17">position:</text:span><text:span text:style-name="T18">fixed</text:span><text:span text:style-name="T52">, </text:span><text:span text:style-name="T17">opacity:</text:span><text:span text:style-name="T18">1</text:span><text:span text:style-name="T52"> and </text:span><text:span text:style-name="T17">z-index</text:span><text:span text:style-name="T52"> </text:span><text:span text:style-name="T53">according to the current setting of the class attribute </text:span><text:span text:style-name="T18">this.zLevel</text:span><text:span text:style-name="T53">.<text:line-break/></text:span><text:span text:style-name="T54">The result of this function should be assigned to </text:span><text:span text:style-name="T19">this.#modal.style.cssText</text:span><text:span text:style-name="T54">.</text:span></text:p>
      <text:p text:style-name="P33"><text:span text:style-name="T5">popupSet</text:span><text:span text:style-name="T4">.#</text:span><text:span text:style-name="T5">chkParam(paramSet,idx)</text:span>: <text:span text:style-name="T67">returns true if paramSet[idx] is set. This can be usefull if some parameters are optional.</text:span></text:p>
      <text:p text:style-name="P33"><text:soft-page-break/></text:p>
      <text:p text:style-name="P33"/>
      <text:h text:style-name="P65" text:outline-level="1">Exampel<text:span text:style-name="T81">s</text:span></text:h>
      <text:p text:style-name="P84"/>
      <text:p text:style-name="P85">The exampel<text:span text:style-name="T73">s</text:span> should help to understand most of the use and customization <text:span text:style-name="T81">of the framework</text:span>. <text:span text:style-name="T73">Using this framework this demo</text:span> implements <text:span text:style-name="T81">5</text:span> different popup types. <text:span text:style-name="T81">Customization may remove these, replace them and add new ones.</text:span></text:p>
      <text:h text:style-name="P61" text:outline-level="2">Image Zoom</text:h>
      <text:p text:style-name="P86">Chosen type identifier is “image”. </text:p>
      <text:p text:style-name="P92">Example code:</text:p>
      <text:p text:style-name="P97">&lt;img src="<text:span text:style-name="T76">picture</text:span>.jpg" onClick="myPopupFamily.popupClick(event,0,'image');"&gt;</text:p>
      <text:p text:style-name="P86">The popup zooms up an image thumbnail. This could be placed in a gallery. When clicking on the small image <text:span text:style-name="T74">(</text:span><text:span text:style-name="T9">img</text:span><text:span text:style-name="T74"> tag)</text:span> the popup first overlays the small image and the<text:span text:style-name="T74">n</text:span> transitions to a bigger size. A maximum height can be passed as parameter to the popup function. <text:span text:style-name="T74">The maximum zoom size will be delimited by the viewport size. The image source will be taken from the clicked </text:span><text:span text:style-name="T9">img</text:span><text:span text:style-name="T74"> element. A close button is located at the upper right corner of the popup.</text:span></text:p>
      <text:h text:style-name="P60" text:outline-level="2">Term <text:span text:style-name="T75">E</text:span>xplanation</text:h>
      <text:p text:style-name="P87">Chosen type identifier is “<text:span text:style-name="T74">wiki</text:span>”.</text:p>
      <text:p text:style-name="P92">Example code that pops up an explanation for the term DOM:</text:p>
      <text:p text:style-name="P98">&lt;a onClick="myPopupFamily.popupClick(event,-1,'wiki')"&gt;DOM&lt;/a&gt;</text:p>
      <text:p text:style-name="P91">When clicking on a term placed in an element with the onclick attribute calling the popup function the popup delivers an explanation for that term. The explanation consists of a header line for the term to be explained and an explanation text. <text:span text:style-name="T75">The popup code picks the term from the clicked element if it is not passed as parameter. This example code picks the explanation text from an associative array. The explanation text itself can contain HTML code which could have nested elements to invoke popups.</text:span></text:p>
      <text:h text:style-name="Heading_20_2" text:outline-level="2">Iframe</text:h>
      <text:p text:style-name="P90">Chosen type identifier is “<text:span text:style-name="T80">iframe</text:span>”.</text:p>
      <text:p text:style-name="P93">Example code that pops up an <text:span text:style-name="T80">iframe with the specified URL. </text:span></text:p>
      <text:p text:style-name="P99">&lt;input type="url" id="link" size="50" value="popup.html"&gt;<text:line-break/>&lt;button onClick="<text:line-break/> <text:s/>myPopupSet.modalClick(event,'iframe'[document.getElementById('link').value]);<text:line-break/> <text:s/>return false;<text:line-break/>"&gt;<text:line-break/><text:soft-page-break/> <text:s/>open link<text:line-break/>&lt;/button&gt;</text:p>
      <text:p text:style-name="P96"><text:span text:style-name="T82">Here we use an instance of popuSet. This allows to reopen the popup to continue on the embedded url because on pop down the DOM object is not removed. </text:span>The url of the content to be displayed in the iframe is passed to the popup call. In this example code the popup will be centered in the viewport with a width/height ratio 2:1. </text:p>
      <text:p text:style-name="P93"/>
      <text:h text:style-name="P60" text:outline-level="2">Feedback</text:h>
      <text:p text:style-name="P88">Chosen type identifier is “<text:span text:style-name="T75">feedback</text:span>”.</text:p>
      <text:p text:style-name="P94">Example call to provide a feedback on some action implemented in javescript e.g. copying something to the clipboard:</text:p>
      <text:p text:style-name="P86">myPopupFamily.popupClick(event,-1,'feedback', ['<text:span text:style-name="T77">URL copied to Clipboard</text:span>', 1500]);</text:p>
      <text:p text:style-name="P94">The popup will display the passed text ( URL copied to Clipboard) for the passed number of milliseconds (1500) next to the click position taken from the <text:span text:style-name="T8">event</text:span> object.</text:p>
      <text:h text:style-name="Heading_20_2" text:outline-level="2">Log <text:span text:style-name="T78">P</text:span>opup <text:span text:style-name="T78">F</text:span>or <text:span text:style-name="T78">D</text:span>ebugging</text:h>
      <text:p text:style-name="P89">Chosen type identifier is “<text:span text:style-name="T78">log</text:span>”.</text:p>
      <text:p text:style-name="P95">This Popup type could be used for debugging if a debugger is not easaly available e.g. on a mobile device to test functionality specifically on that device e.g. behaviour on orientation changes. <text:span text:style-name="T79">A log window is placed in the upper left corner of the viewport.</text:span></text:p>
      <text:p text:style-name="P95">The following logging function makes use of this popup type:</text:p>
      <text:p text:style-name="P100">var myLog = "Javascript Log"; //<text:span text:style-name="T79">accumulated log</text:span></text:p>
      <text:p text:style-name="P100">var logEntry = 0;<text:tab/><text:tab/><text:tab/>// <text:span text:style-name="T79">entry count</text:span></text:p>
      <text:p text:style-name="P100">var myConsole = null;<text:tab/><text:tab/>// <text:span text:style-name="T79">instance of class popupSet</text:span></text:p>
      <text:p text:style-name="P100">function writeLog(logText) {</text:p>
      <text:p text:style-name="P101"><text:tab/>myLog += ("\r\n" + (++logEntry).toString().padStart(3, '0') </text:p>
      <text:p text:style-name="P101"><text:tab/><text:tab/>+ ": " + logText);</text:p>
      <text:p text:style-name="P100"><text:tab/>if (myConsole == null) {</text:p>
      <text:p text:style-name="P100"><text:tab/><text:tab/>myConsole = new popupSet("myConsole",index=100,</text:p>
      <text:p text:style-name="P100"><text:tab/><text:tab/><text:tab/>function (instance,action=null) {</text:p>
      <text:p text:style-name="P100"><text:tab/><text:tab/><text:tab/><text:tab/>if(action==null){</text:p>
      <text:p text:style-name="P100"><text:tab/><text:tab/><text:tab/><text:tab/><text:tab/>myConsole.destructor();</text:p>
      <text:p text:style-name="P100"><text:tab/><text:tab/><text:tab/><text:tab/><text:tab/>myConsole=null;</text:p>
      <text:p text:style-name="P100"><text:tab/><text:tab/><text:tab/><text:tab/>}</text:p>
      <text:p text:style-name="P101"><text:tab/><text:tab/><text:tab/>}</text:p>
      <text:p text:style-name="P101"><text:tab/><text:tab/>);</text:p>
      <text:p text:style-name="P100"><text:tab/><text:tab/>myConsole.modalClick(document.body,"log",[""]);</text:p>
      <text:p text:style-name="P100"><text:tab/>}</text:p>
      <text:p text:style-name="P100"><text:tab/>myConsole.writeLog(myLog);</text:p>
      <text:p text:style-name="P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4-04-30T14:48:38.637000000</dc:date>
    <dc:creator>Frank-Peter Schmidt-Lademann</dc:creator>
    <meta:editing-duration>PT6H17M31S</meta:editing-duration>
    <meta:editing-cycles>11</meta:editing-cycles>
    <meta:document-statistic meta:table-count="0" meta:image-count="0" meta:object-count="0" meta:page-count="7" meta:paragraph-count="151" meta:word-count="2345" meta:character-count="14363" meta:non-whitespace-character-count="12127"/>
  </office:meta>
</office:document-meta>
</file>